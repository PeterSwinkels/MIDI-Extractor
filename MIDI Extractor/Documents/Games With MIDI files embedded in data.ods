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461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10.42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Year:</text:p>
          </table:table-cell>
          <table:table-cell office:value-type="string" table:style-name="ce2">
            <text:p>Files:</text:p>
          </table:table-cell>
          <table:table-cell office:value-type="string" table:style-name="ce2">
            <text:p>Note: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Full Throttle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imuse.u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nce of Persia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midisnd1.da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idisnd2.d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nce of Persia 2: The Shadow &amp; The Flame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midisnd.da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is3vc.da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ismidi.da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andysnd.d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mLife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cpl4life.d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olid State PINBALL Tristan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fm.lib</text:p>
          </table:table-cell>
          <table:table-cell office:value-type="string" table:style-name="ce1">
            <text:p>Extracted MIDI files appear to be valid but produce no soun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 Wars: Dark Forces (demo)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sounds.gob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26-04-03T13:56:48Z</meta:creation-date>
    <dc:date>2026-04-04T08:10:36Z</dc:date>
  </office:meta>
</office:document-meta>
</file>